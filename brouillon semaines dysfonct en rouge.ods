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num_semain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maine_piege</text:p>
          </table:table-cell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nb_detection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emaine_pose_attractif</text:p>
          </table:table-cell>
          <table:table-cell office:value-type="string" calcext:value-type="string">
            <text:p>ecart_attractif</text:p>
          </table:table-cell>
          <table:table-cell office:value-type="string" calcext:value-type="string">
            <text:p>typepiege</text:p>
          </table:table-cell>
          <table:table-cell office:value-type="string" calcext:value-type="string">
            <text:p>odoran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typelieu</text:p>
          </table:table-cell>
          <table:table-cell office:value-type="string" calcext:value-type="string">
            <text:p>hauteur_camera_cm</text:p>
          </table:table-cell>
          <table:table-cell table:number-columns-repeated="1636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]-[.I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]-[.I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]-[.I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24/11/2024</text:p>
          </table:table-cell>
          <table:table-cell table:style-name="ce3" office:value-type="string" calcext:value-type="string">
            <text:p>30/11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5]-[.I5]" office:value-type="float" office:value="3" calcext:value-type="float">
            <text:p>3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01/12/2024</text:p>
          </table:table-cell>
          <table:table-cell table:style-name="ce3" office:value-type="string" calcext:value-type="string">
            <text:p>07/12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6]-[.I6]" office:value-type="float" office:value="4" calcext:value-type="float">
            <text:p>4</text:p>
          </table:table-cell>
          <table:table-cell table:style-name="ce1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]-[.I7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8]-[.I8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9]-[.I9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0]-[.I10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1]-[.I11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2]-[.I12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3]-[.I13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14]-[.I14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5]-[.I15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16]-[.I16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7]-[.I17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8]-[.I18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9]-[.I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0]-[.I2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1]-[.I2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23/03/2025</text:p>
          </table:table-cell>
          <table:table-cell table:style-name="ce3" office:value-type="string" calcext:value-type="string">
            <text:p>29/03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22]-[.I22]" office:value-type="float" office:value="3" calcext:value-type="float">
            <text:p>3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30/03/2025</text:p>
          </table:table-cell>
          <table:table-cell table:style-name="ce3" office:value-type="string" calcext:value-type="string">
            <text:p>05/04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23]-[.I23]" office:value-type="float" office:value="4" calcext:value-type="float">
            <text:p>4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06/04/2025</text:p>
          </table:table-cell>
          <table:table-cell table:style-name="ce3" office:value-type="string" calcext:value-type="string">
            <text:p>12/04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24]-[.I24]" office:value-type="float" office:value="5" calcext:value-type="float">
            <text:p>5</text:p>
          </table:table-cell>
          <table:table-cell table:style-name="ce1"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25]-[.I25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6]-[.I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7]-[.I2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8]-[.I2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9]-[.I29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0]-[.I3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1]-[.I31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01/06/2025</text:p>
          </table:table-cell>
          <table:table-cell table:style-name="ce3" office:value-type="string" calcext:value-type="string">
            <text:p>07/06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32]-[.I32]" office:value-type="float" office:value="6" calcext:value-type="float">
            <text:p>6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08/06/2025</text:p>
          </table:table-cell>
          <table:table-cell table:style-name="ce3" office:value-type="string" calcext:value-type="string">
            <text:p>14/06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33]-[.I33]" office:value-type="float" office:value="7" calcext:value-type="float">
            <text:p>7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15/06/2025</text:p>
          </table:table-cell>
          <table:table-cell table:style-name="ce3" office:value-type="string" calcext:value-type="string">
            <text:p>21/06/20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34]-[.I34]" office:value-type="float" office:value="8" calcext:value-type="float">
            <text:p>8</text:p>
          </table:table-cell>
          <table:table-cell table:style-name="ce1"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5]-[.I35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6]-[.I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7]-[.I3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]-[.I3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9]-[.I39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0]-[.I4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]-[.I41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2]-[.I42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3]-[.I43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4]-[.I44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]-[.I45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6]-[.I46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7]-[.I47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]-[.I48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9]-[.I49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0]-[.I50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1]-[.I51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2]-[.I52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3]-[.I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4]-[.I5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5]-[.I5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6]-[.I5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7]-[.I5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06/04/2025</text:p>
          </table:table-cell>
          <table:table-cell table:style-name="ce3" office:value-type="string" calcext:value-type="string">
            <text:p>12/04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58]-[.I58]" office:value-type="float" office:value="5" calcext:value-type="float">
            <text:p>5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13/04/2025</text:p>
          </table:table-cell>
          <table:table-cell table:style-name="ce3" office:value-type="string" calcext:value-type="string">
            <text:p>19/04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59]-[.I59]" office:value-type="float" office:value="6" calcext:value-type="float">
            <text:p>6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20/04/2025</text:p>
          </table:table-cell>
          <table:table-cell table:style-name="ce3" office:value-type="string" calcext:value-type="string">
            <text:p>26/04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60]-[.I60]" office:value-type="float" office:value="0" calcext:value-type="float">
            <text:p>0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27/04/2025</text:p>
          </table:table-cell>
          <table:table-cell table:style-name="ce3" office:value-type="string" calcext:value-type="string">
            <text:p>03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61]-[.I61]" office:value-type="float" office:value="1" calcext:value-type="float">
            <text:p>1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04/05/2025</text:p>
          </table:table-cell>
          <table:table-cell table:style-name="ce3" office:value-type="string" calcext:value-type="string">
            <text:p>10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62]-[.I62]" office:value-type="float" office:value="2" calcext:value-type="float">
            <text:p>2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11/05/2025</text:p>
          </table:table-cell>
          <table:table-cell table:style-name="ce3" office:value-type="string" calcext:value-type="string">
            <text:p>17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[.A63]-[.I63]" office:value-type="float" office:value="0" calcext:value-type="float">
            <text:p>0</text:p>
          </table:table-cell>
          <table:table-cell table:style-name="ce1"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4]-[.I6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5]-[.I6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6]-[.I6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7]-[.I6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8]-[.I68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9]-[.I69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0]-[.I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71]-[.I7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]-[.I7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3]-[.I73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4]-[.I74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]-[.I75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6]-[.I76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7]-[.I77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8]-[.I78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9]-[.I79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80]-[.I80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81]-[.I81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82]-[.I82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83]-[.I83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84]-[.I84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85]-[.I85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86]-[.I86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7]-[.I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8]-[.I8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9]-[.I8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90]-[.I9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91]-[.I9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92]-[.I9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93]-[.I9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94]-[.I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95]-[.I9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96]-[.I9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97]-[.I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98]-[.I9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99]-[.I9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00]-[.I10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01]-[.I10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02]-[.I10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03]-[.I10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04]-[.I1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05]-[.I10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06]-[.I10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07]-[.I10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08]-[.I108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09]-[.I109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10]-[.I110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11]-[.I111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112]-[.I112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113]-[.I113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14]-[.I11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15]-[.I115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26/01/2025</text:p>
          </table:table-cell>
          <table:table-cell table:style-name="ce3" office:value-type="string" calcext:value-type="string">
            <text:p>01/02/202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formula="of:=[.A116]-[.I116]" office:value-type="float" office:value="12" calcext:value-type="float">
            <text:p>12</text:p>
          </table:table-cell>
          <table:table-cell table:style-name="ce1"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17]-[.I117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118]-[.I118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19]-[.I119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20]-[.I120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02/03/2025</text:p>
          </table:table-cell>
          <table:table-cell table:style-name="ce3" office:value-type="string" calcext:value-type="string">
            <text:p>08/03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121]-[.I121]" office:value-type="float" office:value="0" calcext:value-type="float">
            <text:p>0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09/03/2025</text:p>
          </table:table-cell>
          <table:table-cell table:style-name="ce3" office:value-type="string" calcext:value-type="string">
            <text:p>15/03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122]-[.I122]" office:value-type="float" office:value="1" calcext:value-type="float">
            <text:p>1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16/03/2025</text:p>
          </table:table-cell>
          <table:table-cell table:style-name="ce3" office:value-type="string" calcext:value-type="string">
            <text:p>22/03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123]-[.I123]" office:value-type="float" office:value="2" calcext:value-type="float">
            <text:p>2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23/03/2025</text:p>
          </table:table-cell>
          <table:table-cell table:style-name="ce3" office:value-type="string" calcext:value-type="string">
            <text:p>29/03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124]-[.I124]" office:value-type="float" office:value="3" calcext:value-type="float">
            <text:p>3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30/03/2025</text:p>
          </table:table-cell>
          <table:table-cell table:style-name="ce3" office:value-type="string" calcext:value-type="string">
            <text:p>05/04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125]-[.I125]" office:value-type="float" office:value="4" calcext:value-type="float">
            <text:p>4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06/04/2025</text:p>
          </table:table-cell>
          <table:table-cell table:style-name="ce3" office:value-type="string" calcext:value-type="string">
            <text:p>12/04/20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126]-[.I126]" office:value-type="float" office:value="5" calcext:value-type="float">
            <text:p>5</text:p>
          </table:table-cell>
          <table:table-cell table:style-name="ce1"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127]-[.I127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28]-[.I1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29]-[.I12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0]-[.I13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1]-[.I131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2]-[.I132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3]-[.I133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4]-[.I134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5]-[.I135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6]-[.I136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37]-[.I137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38]-[.I1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39]-[.I13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0]-[.I14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1]-[.I141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142]-[.I142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3]-[.I143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4]-[.I144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5]-[.I145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6]-[.I146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7]-[.I147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8]-[.I148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49]-[.I149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50]-[.I150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51]-[.I151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152]-[.I152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53]-[.I153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54]-[.I154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55]-[.I1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56]-[.I15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57]-[.I157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58]-[.I158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59]-[.I15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60]-[.I160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161]-[.I161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62]-[.I1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63]-[.I16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64]-[.I16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65]-[.I1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66]-[.I16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67]-[.I167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68]-[.I168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69]-[.I16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70]-[.I170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71]-[.I171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2]-[.I1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3]-[.I17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4]-[.I17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5]-[.I175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6]-[.I176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7]-[.I177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8]-[.I178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79]-[.I179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80]-[.I180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81]-[.I181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82]-[.I182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83]-[.I183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84]-[.I184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85]-[.I185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186]-[.I186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87]-[.I187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88]-[.I188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89]-[.I1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90]-[.I19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91]-[.I19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92]-[.I192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93]-[.I193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194]-[.I194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195]-[.I195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96]-[.I1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97]-[.I19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198]-[.I19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199]-[.I1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00]-[.I20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01]-[.I20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02]-[.I202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03]-[.I203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04]-[.I204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05]-[.I205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06]-[.I2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07]-[.I20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08]-[.I20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09]-[.I209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10]-[.I21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11]-[.I211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12]-[.I212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13]-[.I213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14]-[.I214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05/01/2025</text:p>
          </table:table-cell>
          <table:table-cell table:style-name="ce3" office:value-type="string" calcext:value-type="string">
            <text:p>11/01/202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formula="of:=[.A215]-[.I215]" office:value-type="float" office:value="9" calcext:value-type="float">
            <text:p>9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12/01/2025</text:p>
          </table:table-cell>
          <table:table-cell table:style-name="ce3" office:value-type="string" calcext:value-type="string">
            <text:p>18/01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216]-[.I216]" office:value-type="float" office:value="10" calcext:value-type="float">
            <text:p>10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19/01/2025</text:p>
          </table:table-cell>
          <table:table-cell table:style-name="ce3" office:value-type="string" calcext:value-type="string">
            <text:p>25/01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217]-[.I217]" office:value-type="float" office:value="11" calcext:value-type="float">
            <text:p>11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26/01/2025</text:p>
          </table:table-cell>
          <table:table-cell table:style-name="ce3" office:value-type="string" calcext:value-type="string">
            <text:p>01/02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218]-[.I218]" office:value-type="float" office:value="12" calcext:value-type="float">
            <text:p>12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02/02/2025</text:p>
          </table:table-cell>
          <table:table-cell table:style-name="ce3" office:value-type="string" calcext:value-type="string">
            <text:p>08/02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219]-[.I219]" office:value-type="float" office:value="13" calcext:value-type="float">
            <text:p>13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09/02/2025</text:p>
          </table:table-cell>
          <table:table-cell table:style-name="ce3" office:value-type="string" calcext:value-type="string">
            <text:p>15/02/202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formula="of:=[.A220]-[.I220]" office:value-type="float" office:value="14" calcext:value-type="float">
            <text:p>14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16/02/2025</text:p>
          </table:table-cell>
          <table:table-cell table:style-name="ce3" office:value-type="string" calcext:value-type="string">
            <text:p>22/02/20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221]-[.I221]" office:value-type="float" office:value="15" calcext:value-type="float">
            <text:p>15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23/02/2025</text:p>
          </table:table-cell>
          <table:table-cell table:style-name="ce3" office:value-type="string" calcext:value-type="string">
            <text:p>01/03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222]-[.I222]" office:value-type="float" office:value="16" calcext:value-type="float">
            <text:p>16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02/03/2025</text:p>
          </table:table-cell>
          <table:table-cell table:style-name="ce3" office:value-type="string" calcext:value-type="string">
            <text:p>08/03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223]-[.I223]" office:value-type="float" office:value="0" calcext:value-type="float">
            <text:p>0</text:p>
          </table:table-cell>
          <table:table-cell table:style-name="ce1"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24]-[.I22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25]-[.I22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26]-[.I22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27]-[.I22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28]-[.I228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229]-[.I229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20/04/2025</text:p>
          </table:table-cell>
          <table:table-cell table:style-name="ce3" office:value-type="string" calcext:value-type="string">
            <text:p>26/04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230]-[.I230]" office:value-type="float" office:value="0" calcext:value-type="float">
            <text:p>0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office:value-type="string" calcext:value-type="string">
            <text:p>27/04/2025</text:p>
          </table:table-cell>
          <table:table-cell table:style-name="ce3" office:value-type="string" calcext:value-type="string">
            <text:p>03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231]-[.I231]" office:value-type="float" office:value="1" calcext:value-type="float">
            <text:p>1</text:p>
          </table:table-cell>
          <table:table-cell table:style-name="ce1"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2]-[.I23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3]-[.I233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4]-[.I234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5]-[.I235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6]-[.I236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7]-[.I237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8]-[.I238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39]-[.I239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40]-[.I2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41]-[.I24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3" office:value-type="string" calcext:value-type="string">
            <text:p>17/11/2024</text:p>
          </table:table-cell>
          <table:table-cell table:style-name="ce3" office:value-type="string" calcext:value-type="string">
            <text:p>23/11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242]-[.I242]" office:value-type="float" office:value="2" calcext:value-type="float">
            <text:p>2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3" office:value-type="string" calcext:value-type="string">
            <text:p>24/11/2024</text:p>
          </table:table-cell>
          <table:table-cell table:style-name="ce3" office:value-type="string" calcext:value-type="string">
            <text:p>30/11/202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formula="of:=[.A243]-[.I243]" office:value-type="float" office:value="3" calcext:value-type="float">
            <text:p>3</text:p>
          </table:table-cell>
          <table:table-cell table:style-name="ce1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44]-[.I244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45]-[.I245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46]-[.I246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47]-[.I247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48]-[.I248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49]-[.I249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50]-[.I250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51]-[.I251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52]-[.I252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53]-[.I253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254]-[.I254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55]-[.I255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56]-[.I256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57]-[.I2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58]-[.I25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59]-[.I25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60]-[.I26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61]-[.I26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62]-[.I26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263]-[.I26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64]-[.I2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65]-[.I26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66]-[.I26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67]-[.I2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68]-[.I26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69]-[.I26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70]-[.I27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71]-[.I27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72]-[.I27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273]-[.I27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74]-[.I2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75]-[.I27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76]-[.I27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77]-[.I27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78]-[.I278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79]-[.I279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80]-[.I280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81]-[.I281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82]-[.I282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83]-[.I283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84]-[.I28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85]-[.I285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86]-[.I286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287]-[.I287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288]-[.I288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89]-[.I289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90]-[.I290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91]-[.I2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92]-[.I29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93]-[.I293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94]-[.I29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95]-[.I295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96]-[.I296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297]-[.I297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98]-[.I2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299]-[.I29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00]-[.I30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1]-[.I3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2]-[.I30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3]-[.I303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4]-[.I30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5]-[.I305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6]-[.I306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7]-[.I307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08]-[.I3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09]-[.I30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10]-[.I31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11]-[.I311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12]-[.I312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13]-[.I313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14]-[.I314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15]-[.I315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16]-[.I316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17]-[.I317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18]-[.I318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319]-[.I319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20]-[.I320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21]-[.I321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22]-[.I322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23]-[.I323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24]-[.I324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25]-[.I3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26]-[.I32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27]-[.I327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28]-[.I328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29]-[.I32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30]-[.I330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331]-[.I331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2]-[.I3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3]-[.I33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4]-[.I33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5]-[.I335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6]-[.I336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7]-[.I337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8]-[.I338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39]-[.I339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40]-[.I340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341]-[.I341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42]-[.I3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43]-[.I34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44]-[.I34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45]-[.I345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46]-[.I346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47]-[.I347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48]-[.I348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49]-[.I349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50]-[.I350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51]-[.I351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52]-[.I352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353]-[.I353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54]-[.I354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55]-[.I355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56]-[.I356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57]-[.I357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58]-[.I358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59]-[.I3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60]-[.I36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61]-[.I36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62]-[.I362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string" calcext:value-type="string">
            <text:p>30/03/2025</text:p>
          </table:table-cell>
          <table:table-cell table:style-name="ce3" office:value-type="string" calcext:value-type="string">
            <text:p>05/04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363]-[.I363]" office:value-type="float" office:value="4" calcext:value-type="float">
            <text:p>4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string" calcext:value-type="string">
            <text:p>06/04/2025</text:p>
          </table:table-cell>
          <table:table-cell table:style-name="ce3" office:value-type="string" calcext:value-type="string">
            <text:p>12/04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364]-[.I364]" office:value-type="float" office:value="5" calcext:value-type="float">
            <text:p>5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string" calcext:value-type="string">
            <text:p>13/04/2025</text:p>
          </table:table-cell>
          <table:table-cell table:style-name="ce3" office:value-type="string" calcext:value-type="string">
            <text:p>19/04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A365]-[.I365]" office:value-type="float" office:value="6" calcext:value-type="float">
            <text:p>6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string" calcext:value-type="string">
            <text:p>20/04/2025</text:p>
          </table:table-cell>
          <table:table-cell table:style-name="ce3" office:value-type="string" calcext:value-type="string">
            <text:p>26/04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366]-[.I366]" office:value-type="float" office:value="0" calcext:value-type="float">
            <text:p>0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string" calcext:value-type="string">
            <text:p>27/04/2025</text:p>
          </table:table-cell>
          <table:table-cell table:style-name="ce3" office:value-type="string" calcext:value-type="string">
            <text:p>03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367]-[.I367]" office:value-type="float" office:value="1" calcext:value-type="float">
            <text:p>1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string" calcext:value-type="string">
            <text:p>04/05/2025</text:p>
          </table:table-cell>
          <table:table-cell table:style-name="ce3" office:value-type="string" calcext:value-type="string">
            <text:p>10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368]-[.I368]" office:value-type="float" office:value="2" calcext:value-type="float">
            <text:p>2</text:p>
          </table:table-cell>
          <table:table-cell table:style-name="ce1"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69]-[.I3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70]-[.I37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71]-[.I37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72]-[.I372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73]-[.I373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74]-[.I374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75]-[.I375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76]-[.I3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77]-[.I37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78]-[.I37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79]-[.I379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0]-[.I38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1]-[.I381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2]-[.I382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3]-[.I383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4]-[.I384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5]-[.I385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6]-[.I386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87]-[.I387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8]-[.I388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89]-[.I389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390]-[.I390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91]-[.I391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92]-[.I392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93]-[.I3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94]-[.I39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95]-[.I39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96]-[.I39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97]-[.I39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398]-[.I398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399]-[.I399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00]-[.I4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01]-[.I40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02]-[.I40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03]-[.I4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04]-[.I40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05]-[.I40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06]-[.I40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07]-[.I40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08]-[.I408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09]-[.I409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0]-[.I4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1]-[.I41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2]-[.I41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3]-[.I413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4]-[.I414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415]-[.I415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6]-[.I416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7]-[.I417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18]-[.I418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19]-[.I419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20]-[.I420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21]-[.I421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22]-[.I422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23]-[.I423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24]-[.I424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25]-[.I425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26]-[.I426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27]-[.I4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28]-[.I42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29]-[.I42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30]-[.I43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31]-[.I43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32]-[.I43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433]-[.I43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34]-[.I4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35]-[.I43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36]-[.I43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37]-[.I43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38]-[.I438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39]-[.I439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40]-[.I440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41]-[.I441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42]-[.I442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443]-[.I443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44]-[.I4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45]-[.I44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46]-[.I44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47]-[.I44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48]-[.I448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49]-[.I449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0]-[.I450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3" office:value-type="string" calcext:value-type="string">
            <text:p>22/12/2024</text:p>
          </table:table-cell>
          <table:table-cell table:style-name="ce3" office:value-type="string" calcext:value-type="string">
            <text:p>28/12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451]-[.I451]" office:value-type="float" office:value="7" calcext:value-type="float">
            <text:p>7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3" office:value-type="string" calcext:value-type="string">
            <text:p>29/12/2024</text:p>
          </table:table-cell>
          <table:table-cell table:style-name="ce3" office:value-type="string" calcext:value-type="string">
            <text:p>04/01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452]-[.I452]" office:value-type="float" office:value="8" calcext:value-type="float">
            <text:p>8</text:p>
          </table:table-cell>
          <table:table-cell table:style-name="ce1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3]-[.I453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4]-[.I45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5]-[.I455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6]-[.I456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7]-[.I457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58]-[.I458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59]-[.I459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60]-[.I460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61]-[.I4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62]-[.I46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63]-[.I463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64]-[.I46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65]-[.I465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66]-[.I466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467]-[.I467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3" office:value-type="string" calcext:value-type="string">
            <text:p>20/04/2025</text:p>
          </table:table-cell>
          <table:table-cell table:style-name="ce3" office:value-type="string" calcext:value-type="string">
            <text:p>26/04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468]-[.I468]" office:value-type="float" office:value="0" calcext:value-type="float">
            <text:p>0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3" office:value-type="string" calcext:value-type="string">
            <text:p>27/04/2025</text:p>
          </table:table-cell>
          <table:table-cell table:style-name="ce3" office:value-type="string" calcext:value-type="string">
            <text:p>03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469]-[.I469]" office:value-type="float" office:value="1" calcext:value-type="float">
            <text:p>1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3" office:value-type="string" calcext:value-type="string">
            <text:p>04/05/2025</text:p>
          </table:table-cell>
          <table:table-cell table:style-name="ce3" office:value-type="string" calcext:value-type="string">
            <text:p>10/05/2025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A470]-[.I470]" office:value-type="float" office:value="2" calcext:value-type="float">
            <text:p>2</text:p>
          </table:table-cell>
          <table:table-cell table:style-name="ce1"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71]-[.I4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72]-[.I47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73]-[.I473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74]-[.I47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75]-[.I475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76]-[.I476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477]-[.I477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78]-[.I4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79]-[.I47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0]-[.I48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1]-[.I481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2]-[.I482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3]-[.I483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4]-[.I484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5]-[.I485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86]-[.I486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7]-[.I487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8]-[.I488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89]-[.I489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90]-[.I490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91]-[.I491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492]-[.I492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93]-[.I493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94]-[.I494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95]-[.I4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96]-[.I49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97]-[.I497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98]-[.I498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499]-[.I49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00]-[.I500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501]-[.I501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02]-[.I5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03]-[.I50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04]-[.I50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05]-[.I5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06]-[.I50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07]-[.I507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08]-[.I508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09]-[.I50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10]-[.I510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11]-[.I511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12]-[.I5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13]-[.I51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3" office:value-type="string" calcext:value-type="string">
            <text:p>17/11/2024</text:p>
          </table:table-cell>
          <table:table-cell table:style-name="ce3" office:value-type="string" calcext:value-type="string">
            <text:p>23/11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514]-[.I514]" office:value-type="float" office:value="2" calcext:value-type="float">
            <text:p>2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3" office:value-type="string" calcext:value-type="string">
            <text:p>24/11/2024</text:p>
          </table:table-cell>
          <table:table-cell table:style-name="ce3" office:value-type="string" calcext:value-type="string">
            <text:p>30/11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515]-[.I515]" office:value-type="float" office:value="3" calcext:value-type="float">
            <text:p>3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3" office:value-type="string" calcext:value-type="string">
            <text:p>01/12/2024</text:p>
          </table:table-cell>
          <table:table-cell table:style-name="ce3" office:value-type="string" calcext:value-type="string">
            <text:p>07/12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516]-[.I516]" office:value-type="float" office:value="4" calcext:value-type="float">
            <text:p>4</text:p>
          </table:table-cell>
          <table:table-cell table:style-name="ce1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517]-[.I517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18]-[.I518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3" office:value-type="string" calcext:value-type="string">
            <text:p>22/12/2024</text:p>
          </table:table-cell>
          <table:table-cell table:style-name="ce3" office:value-type="string" calcext:value-type="string">
            <text:p>28/12/202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519]-[.I519]" office:value-type="float" office:value="7" calcext:value-type="float">
            <text:p>7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3" office:value-type="string" calcext:value-type="string">
            <text:p>29/12/2024</text:p>
          </table:table-cell>
          <table:table-cell table:style-name="ce3" office:value-type="string" calcext:value-type="string">
            <text:p>04/01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520]-[.I520]" office:value-type="float" office:value="8" calcext:value-type="float">
            <text:p>8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3" office:value-type="string" calcext:value-type="string">
            <text:p>05/01/2025</text:p>
          </table:table-cell>
          <table:table-cell table:style-name="ce3" office:value-type="string" calcext:value-type="string">
            <text:p>11/01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521]-[.I521]" office:value-type="float" office:value="9" calcext:value-type="float">
            <text:p>9</text:p>
          </table:table-cell>
          <table:table-cell table:style-name="ce1"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522]-[.I522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23]-[.I523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24]-[.I524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525]-[.I525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26]-[.I526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27]-[.I527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28]-[.I528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29]-[.I5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30]-[.I53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31]-[.I53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32]-[.I532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33]-[.I533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34]-[.I534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535]-[.I535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36]-[.I5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37]-[.I53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38]-[.I53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39]-[.I539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40]-[.I54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41]-[.I541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42]-[.I542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43]-[.I543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44]-[.I544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45]-[.I545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46]-[.I5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47]-[.I54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48]-[.I54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49]-[.I549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0]-[.I55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1]-[.I551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2]-[.I552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3]-[.I553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4]-[.I554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5]-[.I555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6]-[.I556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7]-[.I557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558]-[.I558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59]-[.I559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60]-[.I560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61]-[.I561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62]-[.I562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63]-[.I5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64]-[.I56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65]-[.I56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66]-[.I56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67]-[.I56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68]-[.I568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569]-[.I569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70]-[.I5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71]-[.I57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572]-[.I57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73]-[.I5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74]-[.I57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75]-[.I57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76]-[.I57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77]-[.I57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78]-[.I578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579]-[.I579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0]-[.I5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1]-[.I58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2]-[.I58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3]-[.I583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4]-[.I584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585]-[.I585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6]-[.I586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7]-[.I587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588]-[.I588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89]-[.I589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90]-[.I590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91]-[.I591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92]-[.I592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93]-[.I593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594]-[.I594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95]-[.I595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96]-[.I596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97]-[.I5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98]-[.I59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599]-[.I59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00]-[.I60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01]-[.I60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02]-[.I60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603]-[.I60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04]-[.I6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05]-[.I60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06]-[.I60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07]-[.I6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08]-[.I60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09]-[.I60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10]-[.I61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11]-[.I61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12]-[.I61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13]-[.I61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14]-[.I6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15]-[.I61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16]-[.I61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17]-[.I61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18]-[.I618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619]-[.I619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0]-[.I620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1]-[.I621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2]-[.I622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3]-[.I623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624]-[.I62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5]-[.I625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6]-[.I626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7]-[.I627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28]-[.I628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629]-[.I629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630]-[.I630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31]-[.I6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32]-[.I63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33]-[.I633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34]-[.I63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35]-[.I635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36]-[.I636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637]-[.I637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38]-[.I6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39]-[.I63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0]-[.I64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1]-[.I641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2]-[.I642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3]-[.I643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4]-[.I644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5]-[.I645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6]-[.I646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47]-[.I647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48]-[.I6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49]-[.I64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0]-[.I65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1]-[.I651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2]-[.I652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653]-[.I653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4]-[.I654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5]-[.I655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6]-[.I656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7]-[.I657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658]-[.I658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59]-[.I659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60]-[.I660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61]-[.I661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62]-[.I662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663]-[.I663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664]-[.I664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65]-[.I6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66]-[.I66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67]-[.I667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68]-[.I668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69]-[.I66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70]-[.I670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671]-[.I671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72]-[.I6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73]-[.I67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674]-[.I67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75]-[.I6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76]-[.I67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77]-[.I677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78]-[.I678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79]-[.I67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80]-[.I680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81]-[.I681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2]-[.I6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3]-[.I683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4]-[.I684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5]-[.I685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6]-[.I686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7]-[.I687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8]-[.I688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89]-[.I689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90]-[.I690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91]-[.I691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92]-[.I692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93]-[.I693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94]-[.I694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95]-[.I695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696]-[.I696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697]-[.I697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698]-[.I698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699]-[.I6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00]-[.I70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01]-[.I70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02]-[.I702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03]-[.I703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04]-[.I704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705]-[.I705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06]-[.I7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07]-[.I70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08]-[.I70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09]-[.I7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10]-[.I710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11]-[.I711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12]-[.I712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13]-[.I713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14]-[.I714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15]-[.I715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16]-[.I7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17]-[.I71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18]-[.I718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19]-[.I719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0]-[.I72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1]-[.I721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722]-[.I722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3]-[.I723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4]-[.I724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5]-[.I725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6]-[.I726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7]-[.I727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28]-[.I728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729]-[.I729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730]-[.I730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731]-[.I731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732]-[.I732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33]-[.I7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34]-[.I73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35]-[.I73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36]-[.I736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37]-[.I737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38]-[.I738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739]-[.I739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0]-[.I7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1]-[.I74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2]-[.I74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3]-[.I743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4]-[.I744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5]-[.I745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6]-[.I746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7]-[.I747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8]-[.I748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49]-[.I749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0]-[.I7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1]-[.I751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2]-[.I752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3]-[.I753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4]-[.I754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5]-[.I755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6]-[.I756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7]-[.I757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8]-[.I758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59]-[.I759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60]-[.I760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9/01/2025</text:p>
          </table:table-cell>
          <table:table-cell office:value-type="string" calcext:value-type="string">
            <text:p>25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61]-[.I761]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6/01/2025</text:p>
          </table:table-cell>
          <table:table-cell office:value-type="string" calcext:value-type="string">
            <text:p>01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62]-[.I762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2/02/2025</text:p>
          </table:table-cell>
          <table:table-cell office:value-type="string" calcext:value-type="string">
            <text:p>08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63]-[.I763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9/02/2025</text:p>
          </table:table-cell>
          <table:table-cell office:value-type="string" calcext:value-type="string">
            <text:p>15/02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64]-[.I764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6/02/2025</text:p>
          </table:table-cell>
          <table:table-cell office:value-type="string" calcext:value-type="string">
            <text:p>22/02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765]-[.I765]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766]-[.I766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67]-[.I7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68]-[.I76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69]-[.I76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70]-[.I77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71]-[.I77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772]-[.I77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773]-[.I77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74]-[.I7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75]-[.I77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776]-[.I77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77]-[.I7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78]-[.I778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79]-[.I779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80]-[.I780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81]-[.I781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82]-[.I782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783]-[.I783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3/11/2024</text:p>
          </table:table-cell>
          <table:table-cell office:value-type="string" calcext:value-type="string">
            <text:p>09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84]-[.I7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/11/2024</text:p>
          </table:table-cell>
          <table:table-cell office:value-type="string" calcext:value-type="string">
            <text:p>16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85]-[.I785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/11/2024</text:p>
          </table:table-cell>
          <table:table-cell office:value-type="string" calcext:value-type="string">
            <text:p>23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86]-[.I78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4/11/2024</text:p>
          </table:table-cell>
          <table:table-cell office:value-type="string" calcext:value-type="string">
            <text:p>30/11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87]-[.I78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1/12/2024</text:p>
          </table:table-cell>
          <table:table-cell office:value-type="string" calcext:value-type="string">
            <text:p>07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88]-[.I788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8/12/2024</text:p>
          </table:table-cell>
          <table:table-cell office:value-type="string" calcext:value-type="string">
            <text:p>14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89]-[.I789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/12/2024</text:p>
          </table:table-cell>
          <table:table-cell office:value-type="string" calcext:value-type="string">
            <text:p>21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90]-[.I790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2/12/2024</text:p>
          </table:table-cell>
          <table:table-cell office:value-type="string" calcext:value-type="string">
            <text:p>28/12/20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91]-[.I791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9/12/2024</text:p>
          </table:table-cell>
          <table:table-cell office:value-type="string" calcext:value-type="string">
            <text:p>04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92]-[.I792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5/01/2025</text:p>
          </table:table-cell>
          <table:table-cell office:value-type="string" calcext:value-type="string">
            <text:p>11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93]-[.I793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/01/2025</text:p>
          </table:table-cell>
          <table:table-cell office:value-type="string" calcext:value-type="string">
            <text:p>18/01/20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A794]-[.I79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3" office:value-type="string" calcext:value-type="string">
            <text:p>19/01/2025</text:p>
          </table:table-cell>
          <table:table-cell table:style-name="ce3" office:value-type="string" calcext:value-type="string">
            <text:p>25/01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795]-[.I795]" office:value-type="float" office:value="11" calcext:value-type="float">
            <text:p>11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3" office:value-type="string" calcext:value-type="string">
            <text:p>26/01/2025</text:p>
          </table:table-cell>
          <table:table-cell table:style-name="ce3" office:value-type="string" calcext:value-type="string">
            <text:p>01/02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796]-[.I796]" office:value-type="float" office:value="12" calcext:value-type="float">
            <text:p>12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3" office:value-type="string" calcext:value-type="string">
            <text:p>02/02/2025</text:p>
          </table:table-cell>
          <table:table-cell table:style-name="ce3" office:value-type="string" calcext:value-type="string">
            <text:p>08/02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797]-[.I797]" office:value-type="float" office:value="13" calcext:value-type="float">
            <text:p>13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3" office:value-type="string" calcext:value-type="string">
            <text:p>09/02/2025</text:p>
          </table:table-cell>
          <table:table-cell table:style-name="ce3" office:value-type="string" calcext:value-type="string">
            <text:p>15/02/2025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798]-[.I798]" office:value-type="float" office:value="14" calcext:value-type="float">
            <text:p>14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3" office:value-type="string" calcext:value-type="string">
            <text:p>16/02/2025</text:p>
          </table:table-cell>
          <table:table-cell table:style-name="ce3" office:value-type="string" calcext:value-type="string">
            <text:p>22/02/202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799]-[.I799]" office:value-type="float" office:value="15" calcext:value-type="float">
            <text:p>15</text:p>
          </table:table-cell>
          <table:table-cell table:style-name="ce1"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3/02/2025</text:p>
          </table:table-cell>
          <table:table-cell office:value-type="string" calcext:value-type="string">
            <text:p>01/03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800]-[.I800]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2/03/2025</text:p>
          </table:table-cell>
          <table:table-cell office:value-type="string" calcext:value-type="string">
            <text:p>08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01]-[.I8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9/03/2025</text:p>
          </table:table-cell>
          <table:table-cell office:value-type="string" calcext:value-type="string">
            <text:p>15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02]-[.I80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/03/2025</text:p>
          </table:table-cell>
          <table:table-cell office:value-type="string" calcext:value-type="string">
            <text:p>22/03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03]-[.I803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3/03/2025</text:p>
          </table:table-cell>
          <table:table-cell office:value-type="string" calcext:value-type="string">
            <text:p>29/03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04]-[.I80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0/03/2025</text:p>
          </table:table-cell>
          <table:table-cell office:value-type="string" calcext:value-type="string">
            <text:p>05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05]-[.I805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6/04/2025</text:p>
          </table:table-cell>
          <table:table-cell office:value-type="string" calcext:value-type="string">
            <text:p>12/04/2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806]-[.I806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13/04/2025</text:p>
          </table:table-cell>
          <table:table-cell office:value-type="string" calcext:value-type="string">
            <text:p>19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807]-[.I807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0/04/2025</text:p>
          </table:table-cell>
          <table:table-cell office:value-type="string" calcext:value-type="string">
            <text:p>26/04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808]-[.I8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7/04/2025</text:p>
          </table:table-cell>
          <table:table-cell office:value-type="string" calcext:value-type="string">
            <text:p>03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809]-[.I809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4/05/2025</text:p>
          </table:table-cell>
          <table:table-cell office:value-type="string" calcext:value-type="string">
            <text:p>10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810]-[.I810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/05/2025</text:p>
          </table:table-cell>
          <table:table-cell office:value-type="string" calcext:value-type="string">
            <text:p>17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811]-[.I8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/05/2025</text:p>
          </table:table-cell>
          <table:table-cell office:value-type="string" calcext:value-type="string">
            <text:p>24/05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812]-[.I81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5/05/2025</text:p>
          </table:table-cell>
          <table:table-cell office:value-type="string" calcext:value-type="string">
            <text:p>31/05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813]-[.I813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1/06/2025</text:p>
          </table:table-cell>
          <table:table-cell office:value-type="string" calcext:value-type="string">
            <text:p>07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814]-[.I81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8/06/2025</text:p>
          </table:table-cell>
          <table:table-cell office:value-type="string" calcext:value-type="string">
            <text:p>14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815]-[.I815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/06/2025</text:p>
          </table:table-cell>
          <table:table-cell office:value-type="string" calcext:value-type="string">
            <text:p>21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816]-[.I816]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2/06/2025</text:p>
          </table:table-cell>
          <table:table-cell office:value-type="string" calcext:value-type="string">
            <text:p>28/06/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817]-[.I817]" office:value-type="float" office:value="6" calcext:value-type="float">
            <text:p>6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09:03:53.416109684</meta:creation-date>
    <dc:date>2026-06-15T10:43:20.233902034</dc:date>
    <meta:editing-duration>PT7M5S</meta:editing-duration>
    <meta:editing-cycles>2</meta:editing-cycles>
    <meta:generator>LibreOffice/24.2.7.2$Linux_X86_64 LibreOffice_project/420$Build-2</meta:generator>
    <meta:document-statistic meta:table-count="1" meta:cell-count="5989" meta:object-count="0"/>
  </office:meta>
</office:document-meta>
</file>